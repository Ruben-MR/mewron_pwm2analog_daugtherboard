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2.3283in"/>
    </style:style>
    <style:style style:name="co5" style:family="table-column">
      <style:table-column-properties fo:break-before="auto" style:column-width="1.9217in"/>
    </style:style>
    <style:style style:name="co6" style:family="table-column">
      <style:table-column-properties fo:break-before="auto" style:column-width="2.6161in"/>
    </style:style>
    <style:style style:name="co7" style:family="table-column">
      <style:table-column-properties fo:break-before="auto" style:column-width="4.6925in"/>
    </style:style>
    <style:style style:name="co8" style:family="table-column">
      <style:table-column-properties fo:break-before="auto" style:column-width="2.1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Part #</text:p>
          </table:table-cell>
          <table:table-cell table:style-name="ce1" office:value-type="string" calcext:value-type="string">
            <text:p>Description / Link</text:p>
          </table:table-cell>
          <table:table-cell table:style-name="ce7" office:value-type="string" calcext:value-type="string">
            <text:p>Package / footpri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Instructions / Note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 office:value-type="float" office:value="22112052" calcext:value-type="float">
            <text:p>22112052</text:p>
          </table:table-cell>
          <table:table-cell office:value-type="string" calcext:value-type="string">
            <text:p><text:a xlink:href="https://www.digikey.ch/de/products/detail/molex/0022112052/172027?s=N4IgTCBcDaIOoFkwHYAMBmAtAOQCIgF0BfIA" xlink:type="simple">https://www.digikey.ch/de/products/detail/molex/0022112052/172027?s=N4IgTCBcDaIOoFkwHYAMBmAtAOQCIgF0BfIA</text:a>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J3, 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ex</text:p>
          </table:table-cell>
          <table:table-cell office:value-type="float" office:value="22232021" calcext:value-type="float">
            <text:p>22232021</text:p>
          </table:table-cell>
          <table:table-cell office:value-type="string" calcext:value-type="string">
            <text:p><text:a xlink:href="https://www.digikey.ch/en/products/detail/molex/0022232021/26667?s=N4IgTCBcDa5mBmMAGMBGEBdAvkA" xlink:type="simple">https://www.digikey.ch/en/products/detail/molex/0022232021/26667?s=N4IgTCBcDa5mBmMAGMBGEBdAvkA</text:a>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OSTTE040104</text:p>
          </table:table-cell>
          <table:table-cell office:value-type="string" calcext:value-type="string">
            <text:p><text:a xlink:href="https://www.digikey.ch/en/products/detail/on-shore-technology-inc/OSTTE040104/2351818?s=N4IgTCBcDaIPIGUAqSCiAGALOgjFkAugL5A" xlink:type="simple">https://www.digikey.ch/en/products/detail/on-shore-technology-inc/OSTTE040104/2351818?s=N4IgTCBcDaIPIGUAqSCiAGALOgjFkAugL5A</text:a></text:p>
          </table:table-cell>
          <table:table-cell office:value-type="string" calcext:value-type="string">
            <text:p>TerminalBlock_4Ucon:TerminalBlock_4Ucon_1x04_P3.50mm_Horizontal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DNS/DNP</text:p>
          </table:table-cell>
          <table:table-cell office:value-type="string" calcext:value-type="string">
            <text:p>Not required for assembly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1,C2,C3,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shay Beyschlag</text:p>
          </table:table-cell>
          <table:table-cell office:value-type="string" calcext:value-type="string">
            <text:p>K104K15X7RF5TL2</text:p>
          </table:table-cell>
          <table:table-cell office:value-type="string" calcext:value-type="string">
            <text:p><text:a xlink:href="https://www.digikey.ch/en/products/detail/vishay-beyschlag-draloric-bc-components/K104K15X7RF5TL2/286538?s=N4IgTCBcDaINIEYAMAWRBWAGgdgEoDF0AVAGQgF0BfIA" xlink:type="simple">https://www.digikey.ch/en/products/detail/vishay-beyschlag-draloric-bc-components/K104K15X7RF5TL2/286538?s=N4IgTCBcDaINIEYAMAWRBWAGgdgEoDF0AVAGQgF0BfIA</text:a></text:p>
          </table:table-cell>
          <table:table-cell office:value-type="string" calcext:value-type="string">
            <text:p>Capacitor_THT:C_Rect_L4.0mm_W2.5mm_P2.50mm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C6484IMX/NOPB</text:p>
          </table:table-cell>
          <table:table-cell office:value-type="string" calcext:value-type="string">
            <text:p><text:a xlink:href="https://www.digikey.ch/en/products/detail/texas-instruments/LMC6484AIMX-NOPB/334870" xlink:type="simple">https://www.digikey.ch/en/products/detail/texas-instruments/LMC6484AIMX-NOPB/334870</text:a>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LTC2644CMS-L12#PBF </text:p>
          </table:table-cell>
          <table:table-cell office:value-type="string" calcext:value-type="string">
            <text:p><text:a xlink:href="https://www.digikey.ch/en/products/detail/analog-devices-inc/LTC2644CMS-L12-PBF/4964730?s=N4IgTCBcDaIDIBUDCYBsAWdSCyBlAtHAIxgDEACgEIBiABCALoC%2BQA" xlink:type="simple">https://www.digikey.ch/en/products/detail/analog-devices-inc/LTC2644CMS-L12-PBF/4964730?s=N4IgTCBcDaIDIBUDCYBsAWdSCyBlAtHAIxgDEACgEIBiABCALoC%2BQA</text:a></text:p>
          </table:table-cell>
          <table:table-cell office:value-type="string" calcext:value-type="string">
            <text:p>Package_SO:MSOP-12_3x4.039mm_P0.65mm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dec Components</text:p>
          </table:table-cell>
          <table:table-cell office:value-type="string" calcext:value-type="string">
            <text:p>CSS-1310TB</text:p>
          </table:table-cell>
          <table:table-cell office:value-type="string" calcext:value-type="string">
            <text:p><text:a xlink:href="https://www.digikey.ch/en/products/detail/nidec-components/CSS-1310TB/1124215?s=N4IgTCBcDaIMIGUEFoCMBmVAGAKgIRAF0BfIA" xlink:type="simple">https://www.digikey.ch/en/products/detail/nidec-components/CSS-1310TB/1124215?s=N4IgTCBcDaIMIGUEFoCMBmVAGAKgIRAF0BfIA</text:a></text:p>
          </table:table-cell>
          <table:table-cell office:value-type="string" calcext:value-type="string">
            <text:p>CSS-1310TB:JSM07011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 Passive Product</text:p>
          </table:table-cell>
          <table:table-cell table:style-name="ce5" office:value-type="string" calcext:value-type="string">
            <text:p>YR1B66K2CC</text:p>
          </table:table-cell>
          <table:table-cell office:value-type="string" calcext:value-type="string">
            <text:p><text:a xlink:href="https://www.digikey.ch/en/products/detail/te-connectivity-passive-product/YR1B33K2CC/2390834" xlink:type="simple">https://www.digikey.ch/en/products/detail/te-connectivity-passive-product/YR1B33K2CC/2390834</text:a>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YR1B33K5CC</text:p>
          </table:table-cell>
          <table:table-cell office:value-type="string" calcext:value-type="string">
            <text:p><text:a xlink:href="https://www.digikey.ch/en/products/detail/te-connectivity-passive-product/YR1B66K5CC/2390918" xlink:type="simple">https://www.digikey.ch/en/products/detail/te-connectivity-passive-product/YR1B66K5CC/2390918</text:a>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YR1B10KCC</text:p>
          </table:table-cell>
          <table:table-cell office:value-type="string" calcext:value-type="string">
            <text:p><text:a xlink:href="https://www.digikey.ch/en/products/detail/te-connectivity-passive-product/YR1B10KCC/2389737?s=N4IgTCBcDaIJoCUCMAhJAGA0gYWyAugL5A" xlink:type="simple">https://www.digikey.ch/en/products/detail/te-connectivity-passive-product/YR1B10KCC/2389737?s=N4IgTCBcDaIJoCUCMAhJAGA0gYWyAugL5A</text:a>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Thru-hole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1:51:50.9302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09:56:38.708907900</meta:creation-date>
    <dc:date>2026-06-25T11:54:22.314859100</dc:date>
    <meta:editing-duration>PT27M41S</meta:editing-duration>
    <meta:editing-cycles>9</meta:editing-cycles>
    <meta:generator>LibreOffice/26.2.1.2$Windows_X86_64 LibreOffice_project/620$Build-2</meta:generator>
    <meta:document-statistic meta:table-count="1" meta:cell-count="100" meta:object-count="0"/>
  </office:meta>
</office:document-meta>
</file>